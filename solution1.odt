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4000000B6F11360E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fo:color="#1f1f1f" loext:opacity="100%" style:font-name="Google Sans Text"/>
    </style:style>
    <style:style style:name="P3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fo:color="#1f1f1f" loext:opacity="100%" style:font-name="Google Sans"/>
    </style:style>
    <style:style style:name="P4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fo:color="#1f1f1f" loext:opacity="100%" style:font-name="Google Sans"/>
    </style:style>
    <style:style style:name="P5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1f1f1f" loext:opacity="100%" style:font-name="Google Sans Text"/>
    </style:style>
    <style:style style:name="P6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1f1f1f" loext:opacity="100%" style:font-name="Google Sans Text"/>
    </style:style>
    <style:style style:name="P7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1f1f1f" loext:opacity="100%" style:font-name="Google Sans Text"/>
    </style:style>
    <style:style style:name="P8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1f1f1f" loext:opacity="100%" style:font-name="Google Sans Text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line-height="114%" fo:text-indent="0in" style:auto-text-indent="false"/>
      <style:text-properties fo:color="#1f1f1f" loext:opacity="100%" style:font-name="Google Sans Text"/>
    </style:style>
    <style:style style:name="P10" style:family="paragraph" style:parent-style-name="Preformatted_20_Text">
      <style:paragraph-properties fo:margin-top="0in" fo:margin-bottom="0in" style:contextual-spacing="false" fo:line-height="114%"/>
      <style:text-properties fo:color="#1f1f1f" loext:opacity="100%" style:font-name="Google Sans Text"/>
    </style:style>
    <style:style style:name="P11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fo:color="#1f1f1f" loext:opacity="100%" style:font-name="Google Sans Text" fo:font-style="italic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/>
      <style:text-properties fo:color="#1f1f1f" loext:opacity="100%" style:font-name="Google Sans Tex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 Text"/>
    </style:style>
    <style:style style:name="T5" style:family="text">
      <style:text-properties style:font-name="Google Sans Text" fo:font-style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bypass that hypervisor crash, your teammate needs to do two things: <text:span text:style-name="T1">Enable Nested Virtualization</text:span> at the cloud level, and <text:span text:style-name="T1">tweak the Android Emulator settings</text:span> to run without demanding physical hardware acceleration.</text:p>
      <text:p text:style-name="P2">Here is the exact blueprint to make Android Studio emulators work smoothly inside a cloud VM.</text:p>
      <text:h text:style-name="P3" text:outline-level="2">Step 1: Fix the Cloud Infrastructure (The "Hypervisor" Error)</text:h>
      <text:p text:style-name="P2"><text:bookmark text:name="p-rc_5e890d99c7b1933d-29"/>Because a cloud desktop is already a virtual machine, trying to boot an Android Emulator creates a "VM inside a VM." The cloud provider blocks this by default. Your teammate must change their VM instance type or settings to allow <text:span text:style-name="T1">Nested Virtualization</text:span>. </text:p>
      <text:h text:style-name="P4" text:outline-level="3">If they are on Microsoft Azure:</text:h>
      <text:p text:style-name="P2"><text:bookmark text:name="p-rc_5e890d99c7b1933d-30"/>They must change the VM size to a series that supports nested hypervisors (look for a lowercase "<text:span text:style-name="T1">v3</text:span>" or newer in the name, like <text:span text:style-name="T1">Dv3, Dv4, Ev3, or Ev4</text:span> sizes). </text:p>
      <text:list text:style-name="L1">
        <text:list-item>
          <text:p text:style-name="P5">Shut down the VM.</text:p>
        </text:list-item>
        <text:list-item>
          <text:p text:style-name="P5">In the Azure portal, go to <text:span text:style-name="T1">Size</text:span>, select a compatible series, and click <text:span text:style-name="T1">Resize</text:span>.</text:p>
        </text:list-item>
      </text:list>
      <text:h text:style-name="P4" text:outline-level="3">If they are on AWS (EC2):</text:h>
      <text:list text:style-name="L2">
        <text:list-item>
          <text:p text:style-name="P6"><text:bookmark text:name="p-rc_5e890d99c7b1933d-31"/>Shut down the instance. </text:p>
        </text:list-item>
        <text:list-item>
          <text:p text:style-name="P6"><text:bookmark text:name="p-rc_5e890d99c7b1933d-32"/>Go to the EC2 Console -&gt; <text:span text:style-name="T1">Instance Settings</text:span> -&gt; <text:span text:style-name="T1">Change CPU options</text:span>. </text:p>
        </text:list-item>
        <text:list-item>
          <text:p text:style-name="P6"><text:bookmark text:name="p-rc_5e890d99c7b1933d-33"/>Under <text:span text:style-name="T1">Nested Virtualization</text:span>, select <text:span text:style-name="T1">Enable</text:span> and save. <text:span text:style-name="T2">(Note: AWS supports this on modern virtualized instances like C8i, M8i, and R8i).</text:span> </text:p>
        </text:list-item>
      </text:list>
      <text:h text:style-name="P3" text:outline-level="2">Step 2: Turn on Windows Hyper-V Features</text:h>
      <text:p text:style-name="P2">Once the cloud provider allows it, Windows needs to be told to handle the virtualization. Inside the Windows Virtual Desktop:</text:p>
      <text:list text:style-name="L3">
        <text:list-item>
          <text:p text:style-name="P7">Click the Windows Start menu, type <text:span text:style-name="T1">Turn Windows features on or off</text:span>, and open it.</text:p>
        </text:list-item>
        <text:list-item>
          <text:p text:style-name="P7">Check the box for <text:span text:style-name="T1">Hyper-V</text:span> (ensure both <text:span text:style-name="T2">Hyper-V Management Tools</text:span> and <text:span text:style-name="T2">Hyper-V Platform</text:span> are ticked).</text:p>
        </text:list-item>
        <text:list-item>
          <text:p text:style-name="P7">Check the box for <text:span text:style-name="T1">Windows Hypervisor Platform</text:span>.</text:p>
        </text:list-item>
        <text:list-item>
          <text:p text:style-name="P7">Click <text:span text:style-name="T1">OK</text:span>, let Windows install the files, and <text:span text:style-name="T1">restart the virtual machine</text:span>.</text:p>
        </text:list-item>
      </text:list>
      <text:h text:style-name="P3" text:outline-level="2"><text:soft-page-break/>Step 3: Create a Cloud-Friendly Emulator in Android Studio</text:h>
      <text:p text:style-name="P2">Now that the hypervisor error is handled, create a specific type of Virtual Device that uses <text:span text:style-name="T1">Software Rendering</text:span> instead of hardware graphics (since cloud VMs usually lack dedicated GPUs).</text:p>
      <text:list text:style-name="L4">
        <text:list-item>
          <text:p text:style-name="P8">Open Android Studio and launch the <text:span text:style-name="T1">Device Manager</text:span>.</text:p>
        </text:list-item>
        <text:list-item>
          <text:p text:style-name="P8">Click <text:span text:style-name="T1">Create Virtual Device</text:span> and choose a tablet profile (like the <text:span text:style-name="T1">Nexus 9</text:span>).</text:p>
        </text:list-item>
        <text:list-item>
          <text:p text:style-name="P8">When selecting a System Image (Android Version), <text:span text:style-name="T1">choose an </text:span><text:span text:style-name="Source_20_Text"><text:span text:style-name="T3">x86_64</text:span></text:span><text:span text:style-name="T1"> image</text:span> (do NOT use ARM/Google Play system images, as they run too slowly on VMs).</text:p>
        </text:list-item>
        <text:list-item>
          <text:p text:style-name="P8">On the final confirmation screen (Verify Configuration), look for the <text:span text:style-name="T1">Graphics</text:span> dropdown.</text:p>
        </text:list-item>
        <text:list-item>
          <text:p text:style-name="P8">Change <text:span text:style-name="T1">Graphics</text:span> from <text:span text:style-name="T2">Automatic/Hardware</text:span> to <text:span text:style-name="T1">Software - GLES 2.0</text:span>.</text:p>
        </text:list-item>
        <text:list-item>
          <text:p text:style-name="P8">Click <text:span text:style-name="T1">Finish</text:span>.</text:p>
        </text:list-item>
      </text:list>
      <text:h text:style-name="P3" text:outline-level="2">Step 4: Launching it without a GUI Crash</text:h>
      <text:p text:style-name="P2">If clicking the standard "Play" button in Android Studio still causes a stutter or crash, your teammate can bypass the Android Studio UI entirely and force-start the emulator via the command line with headless optimizations.</text:p>
      <text:p text:style-name="P2">Have them open Command Prompt or PowerShell and run:</text:p>
      <text:p text:style-name="P2">DOS</text:p>
      <text:p text:style-name="P2"><draw:frame draw:style-name="fr1" draw:name="Image1" text:anchor-type="char" svg:width="6.6929in" svg:height="1.578in" draw:z-index="0"><draw:image xlink:href="Pictures/1000000100000304000000B6F11360EE.png" xlink:type="simple" xlink:show="embed" xlink:actuate="onLoad" draw:mime-type="image/png"/></draw:frame></text:p>
      <text:p text:style-name="P9"><text:span text:style-name="Source_20_Text"><text:span text:style-name="T4">:: 1. Navigate to the emulator directory</text:span></text:span></text:p>
      <text:p text:style-name="P9"><text:span text:style-name="Source_20_Text"><text:span text:style-name="T4">cd %ANDROID_HOME%\emulator</text:span></text:span></text:p>
      <text:p text:style-name="P10"/>
      <text:p text:style-name="P9"><text:span text:style-name="Source_20_Text"><text:span text:style-name="T4">:: 2. Launch the emulator with software rendering overrides</text:span></text:span></text:p>
      <text:p text:style-name="P10"><text:span text:style-name="Source_20_Text"><text:span text:style-name="T4">.\emulator.exe -avd YOUR_TABLET_DEVICE_NAME -gpu swiftshader_indirect -no-snapshot</text:span></text:span></text:p>
      <text:p text:style-name="P11"/>
      <text:p text:style-name="P2"><text:soft-page-break/><text:span text:style-name="T2">(Replace </text:span><text:span text:style-name="Source_20_Text"><text:span text:style-name="T5">YOUR_TABLET_DEVICE_NAME</text:span></text:span><text:span text:style-name="T2"> with the exact name of the device they created, using underscores instead of spaces, e.g., </text:span><text:span text:style-name="Source_20_Text"><text:span text:style-name="T5">Nexus_9_API_33</text:span></text:span><text:span text:style-name="T2">).</text:span></text:p>
      <text:h text:style-name="P3" text:outline-level="2">Step 5: Verify the Link to Appium</text:h>
      <text:p text:style-name="P2">Once the emulator boots up on the virtual desktop screen, they just need to open a fresh terminal in VS Code and run your usual verification:</text:p>
      <text:p text:style-name="P2">Bash</text:p>
      <text:p text:style-name="P9"><text:span text:style-name="Source_20_Text"><text:span text:style-name="T4">adb devices</text:span></text:span></text:p>
      <text:p text:style-name="P2">As long as it lists the emulator (e.g., <text:span text:style-name="Source_20_Text"><text:span text:style-name="T4">emulator-5554 device</text:span></text:span>), their local Appium server (<text:span text:style-name="Source_20_Text"><text:span text:style-name="T4">npx appium</text:span></text:span>) will be able to target the device, push the application package, and run the layout test suite flawlessly!</text:p>
      <text:p text:style-name="P1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8T12:50:37.061879238</meta:creation-date>
    <dc:date>2026-06-08T12:56:50.932334403</dc:date>
    <meta:editing-duration>PT6M14S</meta:editing-duration>
    <meta:editing-cycles>1</meta:editing-cycles>
    <meta:document-statistic meta:table-count="0" meta:image-count="1" meta:object-count="0" meta:page-count="3" meta:paragraph-count="40" meta:word-count="558" meta:character-count="3391" meta:non-whitespace-character-count="2883"/>
    <meta:generator>LibreOffice/26.2.1.2$Linux_X86_64 LibreOffice_project/8399f6259d8c87f40e7255cdb3c9b958f5e08948</meta:generator>
  </office:meta>
</office:document-meta>
</file>